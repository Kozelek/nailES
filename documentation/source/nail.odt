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9pt" officeooo:rsid="000b3267" officeooo:paragraph-rsid="000b3267" style:font-size-asian="9pt" style:font-size-complex="9pt"/>
    </style:style>
    <style:style style:name="P2" style:family="paragraph" style:parent-style-name="Standard">
      <style:paragraph-properties fo:text-align="center" style:justify-single-word="false"/>
      <style:text-properties fo:font-size="9pt" officeooo:rsid="000c79af" officeooo:paragraph-rsid="000c79af" style:font-size-asian="9pt" style:font-size-complex="9pt"/>
    </style:style>
    <style:style style:name="P3" style:family="paragraph" style:parent-style-name="Standard">
      <style:paragraph-properties fo:text-align="center" style:justify-single-word="false"/>
      <style:text-properties officeooo:rsid="000b3267" officeooo:paragraph-rsid="000b3267"/>
    </style:style>
    <style:style style:name="P4" style:family="paragraph" style:parent-style-name="Standard">
      <style:paragraph-properties fo:text-align="center" style:justify-single-word="false"/>
      <style:text-properties officeooo:rsid="000c79af" officeooo:paragraph-rsid="000c79af"/>
    </style:style>
    <style:style style:name="P5" style:family="paragraph" style:parent-style-name="Standard">
      <style:text-properties officeooo:rsid="000b3267" officeooo:paragraph-rsid="000b3267"/>
    </style:style>
    <style:style style:name="P6" style:family="paragraph" style:parent-style-name="Text_20_body" style:list-style-name="L1">
      <style:text-properties officeooo:rsid="000b3267" officeooo:paragraph-rsid="000b3267"/>
    </style:style>
    <style:style style:name="P7" style:family="paragraph" style:parent-style-name="Text_20_body" style:list-style-name="L2">
      <style:text-properties officeooo:rsid="000b3267" officeooo:paragraph-rsid="000b3267"/>
    </style:style>
    <style:style style:name="P8" style:family="paragraph" style:parent-style-name="Text_20_body" style:list-style-name="L2">
      <style:text-properties officeooo:rsid="00184e85" officeooo:paragraph-rsid="00184e85"/>
    </style:style>
    <style:style style:name="P9" style:family="paragraph" style:parent-style-name="Text_20_body" style:list-style-name="L2">
      <style:text-properties officeooo:rsid="000c74de" officeooo:paragraph-rsid="000c74de"/>
    </style:style>
    <style:style style:name="P10" style:family="paragraph" style:parent-style-name="Heading_20_1">
      <style:text-properties officeooo:rsid="001e0773" officeooo:paragraph-rsid="001e0773"/>
    </style:style>
    <style:style style:name="P11" style:family="paragraph" style:parent-style-name="Text_20_body">
      <style:text-properties officeooo:rsid="001e0773" officeooo:paragraph-rsid="001e0773"/>
    </style:style>
    <style:style style:name="P12" style:family="paragraph" style:parent-style-name="Heading_20_1">
      <style:text-properties officeooo:rsid="000b3267" officeooo:paragraph-rsid="000b3267"/>
    </style:style>
    <style:style style:name="P13" style:family="paragraph" style:parent-style-name="Standard" style:list-style-name="L3"/>
    <style:style style:name="P14" style:family="paragraph" style:parent-style-name="Standard" style:list-style-name="L4">
      <style:text-properties officeooo:paragraph-rsid="0025786f"/>
    </style:style>
    <style:style style:name="P15" style:family="paragraph" style:parent-style-name="Standard" style:list-style-name="L4">
      <style:text-properties officeooo:paragraph-rsid="000f3f4f"/>
    </style:style>
    <style:style style:name="P16" style:family="paragraph" style:parent-style-name="Standard" style:list-style-name="L4">
      <style:text-properties officeooo:paragraph-rsid="000b3267"/>
    </style:style>
    <style:style style:name="P17" style:family="paragraph" style:parent-style-name="Standard" style:list-style-name="L5">
      <style:text-properties officeooo:paragraph-rsid="000b3267"/>
    </style:style>
    <style:style style:name="P18" style:family="paragraph" style:parent-style-name="Standard" style:list-style-name="L6">
      <style:text-properties officeooo:rsid="0021118b" officeooo:paragraph-rsid="0021118b"/>
    </style:style>
    <style:style style:name="P19" style:family="paragraph" style:parent-style-name="Standard">
      <style:text-properties officeooo:rsid="0021118b" officeooo:paragraph-rsid="0021118b"/>
    </style:style>
    <style:style style:name="P20" style:family="paragraph" style:parent-style-name="Standard" style:list-style-name="L4">
      <style:text-properties officeooo:paragraph-rsid="0021118b"/>
    </style:style>
    <style:style style:name="P21" style:family="paragraph" style:parent-style-name="Standard" style:list-style-name="L4">
      <style:text-properties officeooo:paragraph-rsid="00291c71"/>
    </style:style>
    <style:style style:name="P22" style:family="paragraph" style:parent-style-name="Standard">
      <style:text-properties officeooo:rsid="0021118b" officeooo:paragraph-rsid="002f93d9"/>
    </style:style>
    <style:style style:name="P23" style:family="paragraph" style:parent-style-name="Standard" style:list-style-name="L7">
      <style:text-properties fo:font-weight="bold" officeooo:rsid="002f93d9" officeooo:paragraph-rsid="002f93d9" style:font-weight-asian="bold" style:font-weight-complex="bold"/>
    </style:style>
    <style:style style:name="P24" style:family="paragraph" style:parent-style-name="Standard" style:list-style-name="L8"/>
    <style:style style:name="P25" style:family="paragraph" style:parent-style-name="Standard">
      <style:text-properties officeooo:paragraph-rsid="00176c3e"/>
    </style:style>
    <style:style style:name="P26" style:family="paragraph" style:parent-style-name="Standard">
      <style:text-properties officeooo:rsid="001641be" officeooo:paragraph-rsid="001641be"/>
    </style:style>
    <style:style style:name="P27" style:family="paragraph" style:parent-style-name="Text_20_body">
      <style:text-properties officeooo:rsid="001641be" officeooo:paragraph-rsid="001641be"/>
    </style:style>
    <style:style style:name="P28" style:family="paragraph" style:parent-style-name="Text_20_body">
      <style:text-properties officeooo:rsid="002b011d" officeooo:paragraph-rsid="002b011d"/>
    </style:style>
    <style:style style:name="P29" style:family="paragraph" style:parent-style-name="Text_20_body">
      <style:text-properties officeooo:rsid="001f4653" officeooo:paragraph-rsid="001f4653"/>
    </style:style>
    <style:style style:name="P30" style:family="paragraph" style:parent-style-name="Heading_20_1">
      <style:text-properties officeooo:paragraph-rsid="000b3267"/>
    </style:style>
    <style:style style:name="P31" style:family="paragraph" style:parent-style-name="Text_20_body" style:list-style-name="L9">
      <style:text-properties officeooo:paragraph-rsid="000b3267"/>
    </style:style>
    <style:style style:name="P32" style:family="paragraph" style:parent-style-name="Standard" style:list-style-name="L10">
      <style:text-properties officeooo:paragraph-rsid="000b3267"/>
    </style:style>
    <style:style style:name="P33" style:family="paragraph" style:parent-style-name="Standard" style:list-style-name="L11"/>
    <style:style style:name="P34" style:family="paragraph" style:parent-style-name="Standard" style:list-style-name="L11">
      <style:paragraph-properties>
        <style:tab-stops>
          <style:tab-stop style:position="2.311cm"/>
        </style:tab-stops>
      </style:paragraph-properties>
    </style:style>
    <style:style style:name="P35" style:family="paragraph" style:parent-style-name="Text_20_body" style:list-style-name="L12">
      <style:text-properties officeooo:rsid="002c9833" officeooo:paragraph-rsid="002c9833"/>
    </style:style>
    <style:style style:name="P36" style:family="paragraph" style:parent-style-name="Text_20_body" style:list-style-name="L12">
      <style:text-properties officeooo:paragraph-rsid="000c79af"/>
    </style:style>
    <style:style style:name="P37" style:family="paragraph" style:parent-style-name="Standard" style:list-style-name="L12">
      <style:text-properties officeooo:paragraph-rsid="002c9833"/>
    </style:style>
    <style:style style:name="P38" style:family="paragraph" style:parent-style-name="Standard" style:list-style-name="L12">
      <style:text-properties officeooo:rsid="000c79af" officeooo:paragraph-rsid="000c79af"/>
    </style:style>
    <style:style style:name="P39" style:family="paragraph" style:parent-style-name="Standard" style:list-style-name="L12">
      <style:text-properties officeooo:rsid="002d886c" officeooo:paragraph-rsid="002d886c"/>
    </style:style>
    <style:style style:name="P40" style:family="paragraph" style:parent-style-name="Standard" style:list-style-name="L12"/>
    <style:style style:name="P41" style:family="paragraph" style:parent-style-name="Standard" style:list-style-name="L12">
      <style:text-properties officeooo:rsid="0013f8f5" officeooo:paragraph-rsid="0013f8f5"/>
    </style:style>
    <style:style style:name="P42" style:family="paragraph" style:parent-style-name="Standard" style:list-style-name="L13"/>
    <style:style style:name="P43" style:family="paragraph" style:parent-style-name="Standard" style:list-style-name="L13">
      <style:text-properties officeooo:rsid="001328eb" officeooo:paragraph-rsid="001328eb"/>
    </style:style>
    <style:style style:name="P44" style:family="paragraph" style:parent-style-name="Standard" style:list-style-name="L13">
      <style:text-properties officeooo:paragraph-rsid="000b3267"/>
    </style:style>
    <style:style style:name="P45" style:family="paragraph" style:parent-style-name="Standard" style:list-style-name="L14"/>
    <style:style style:name="P46" style:family="paragraph" style:parent-style-name="Standard" style:list-style-name="L15"/>
    <style:style style:name="P47" style:family="paragraph" style:parent-style-name="Standard" style:list-style-name="L16"/>
    <style:style style:name="T1" style:family="text">
      <style:text-properties officeooo:rsid="001e0773"/>
    </style:style>
    <style:style style:name="T2" style:family="text">
      <style:text-properties officeooo:rsid="002f93d9"/>
    </style:style>
    <style:style style:name="T3" style:family="text">
      <style:text-properties fo:font-family="'Courier New'" style:font-family-generic="modern" style:font-pitch="fixed" officeooo:rsid="002f93d9"/>
    </style:style>
    <style:style style:name="T4" style:family="text">
      <style:text-properties officeooo:rsid="0023d66a"/>
    </style:style>
    <style:style style:name="T5" style:family="text">
      <style:text-properties officeooo:rsid="001c43a4"/>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291c71"/>
    </style:style>
    <style:style style:name="T8" style:family="text">
      <style:text-properties officeooo:rsid="0010296b"/>
    </style:style>
    <style:style style:name="T9" style:family="text">
      <style:text-properties officeooo:rsid="001ad0ba"/>
    </style:style>
    <style:style style:name="T10" style:family="text">
      <style:text-properties officeooo:rsid="0025786f"/>
    </style:style>
    <style:style style:name="T11" style:family="text">
      <style:text-properties fo:font-style="italic" officeooo:rsid="0025786f" style:font-style-asian="italic" style:font-style-complex="italic"/>
    </style:style>
    <style:style style:name="T12" style:family="text">
      <style:text-properties fo:font-style="normal" officeooo:rsid="0025786f" style:font-style-asian="normal" style:font-style-complex="normal"/>
    </style:style>
    <style:style style:name="T13" style:family="text">
      <style:text-properties fo:font-style="normal" officeooo:rsid="002f93d9" style:font-style-asian="normal" style:font-style-complex="normal"/>
    </style:style>
    <style:style style:name="T14" style:family="text">
      <style:text-properties fo:font-style="normal" officeooo:rsid="00262e3d" style:font-style-asian="normal" style:font-style-complex="normal"/>
    </style:style>
    <style:style style:name="T15" style:family="text">
      <style:text-properties officeooo:rsid="00196913"/>
    </style:style>
    <style:style style:name="T16" style:family="text">
      <style:text-properties officeooo:rsid="00197009"/>
    </style:style>
    <style:style style:name="T17" style:family="text">
      <style:text-properties fo:font-family="'Courier New'" style:font-family-generic="modern" style:font-pitch="fixed"/>
    </style:style>
    <style:style style:name="T18" style:family="text">
      <style:text-properties style:font-name="Liberation Serif"/>
    </style:style>
    <style:style style:name="T19" style:family="text">
      <style:text-properties style:font-name="Liberation Serif" officeooo:rsid="001f4653"/>
    </style:style>
    <style:style style:name="T20" style:family="text">
      <style:text-properties fo:font-family="'Courier New'" style:font-family-generic="modern" style:font-pitch="fixed" officeooo:rsid="001f4653"/>
    </style:style>
    <style:style style:name="T21" style:family="text">
      <style:text-properties style:font-name="Liberation Serif" officeooo:rsid="00291c71"/>
    </style:style>
    <style:style style:name="T22" style:family="text">
      <style:text-properties fo:font-family="'Courier New'" style:font-family-generic="modern" style:font-pitch="fixed" officeooo:rsid="001e0773"/>
    </style:style>
    <style:style style:name="T23" style:family="text">
      <style:text-properties fo:font-weight="bold" style:font-weight-asian="bold" style:font-weight-complex="bold"/>
    </style:style>
    <style:style style:name="T24" style:family="text">
      <style:text-properties officeooo:rsid="000b3267"/>
    </style:style>
    <style:style style:name="T25" style:family="text">
      <style:text-properties fo:font-weight="bold" officeooo:rsid="0025786f"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0b3267" style:font-weight-asian="normal" style:font-weight-complex="normal"/>
    </style:style>
    <style:style style:name="T28" style:family="text">
      <style:text-properties fo:font-weight="bold" officeooo:rsid="000f3f4f" style:font-weight-asian="bold" style:font-weight-complex="bold"/>
    </style:style>
    <style:style style:name="T29" style:family="text">
      <style:text-properties fo:font-weight="bold" officeooo:rsid="0015c279" style:font-weight-asian="bold" style:font-weight-complex="bold"/>
    </style:style>
    <style:style style:name="T30" style:family="text">
      <style:text-properties fo:font-weight="normal" officeooo:rsid="000f3f4f" style:font-weight-asian="normal" style:font-weight-complex="normal"/>
    </style:style>
    <style:style style:name="T31" style:family="text">
      <style:text-properties fo:font-family="'Courier New'" style:font-family-generic="modern" style:font-pitch="fixed" officeooo:rsid="0021118b"/>
    </style:style>
    <style:style style:name="T32" style:family="text">
      <style:text-properties fo:font-family="'Courier New'" style:font-family-generic="modern" style:font-pitch="fixed" officeooo:rsid="0025786f"/>
    </style:style>
    <style:style style:name="T33" style:family="text">
      <style:text-properties fo:font-family="'Courier New'" style:font-family-generic="modern" style:font-pitch="fixed" officeooo:rsid="00291c71"/>
    </style:style>
    <style:style style:name="T34" style:family="text">
      <style:text-properties fo:font-family="'Courier New'" style:font-family-generic="modern" style:font-pitch="fixed" officeooo:rsid="002f93d9"/>
    </style:style>
    <style:style style:name="T35" style:family="text">
      <style:text-properties officeooo:rsid="00230586"/>
    </style:style>
    <style:style style:name="T36" style:family="text">
      <style:text-properties fo:font-family="'Courier New'" style:font-family-generic="modern" style:font-pitch="fixed" officeooo:rsid="00230586"/>
    </style:style>
    <style:style style:name="T37" style:family="text">
      <style:text-properties officeooo:rsid="002b011d"/>
    </style:style>
    <style:style style:name="T38" style:family="text">
      <style:text-properties officeooo:rsid="00176c3e"/>
    </style:style>
    <style:style style:name="T39" style:family="text">
      <style:text-properties fo:font-family="'Courier New'" style:font-family-generic="modern" style:font-pitch="fixed" officeooo:rsid="002b011d"/>
    </style:style>
    <style:style style:name="T40" style:family="text">
      <style:text-properties officeooo:rsid="0021118b"/>
    </style:style>
    <style:style style:name="T41" style:family="text">
      <style:text-properties style:font-name="Liberation Serif" officeooo:rsid="0021118b"/>
    </style:style>
    <style:style style:name="T42" style:family="text">
      <style:text-properties officeooo:rsid="000c74de"/>
    </style:style>
    <style:style style:name="T43" style:family="text">
      <style:text-properties fo:font-family="'Courier New'" style:font-family-generic="modern" style:font-pitch="fixed" officeooo:rsid="00270d7b"/>
    </style:style>
    <style:style style:name="T44" style:family="text">
      <style:text-properties officeooo:rsid="002c9833"/>
    </style:style>
    <style:style style:name="T45" style:family="text">
      <style:text-properties officeooo:rsid="001f465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812cm" fo:text-indent="-0.635cm" fo:margin-left="7.81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47cm" fo:text-indent="-0.635cm" fo:margin-left="8.447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AIL</text:p>
      <text:p text:style-name="P1">Not An Inform Library</text:p>
      <text:p text:style-name="P2">Version <text:span text:style-name="T1">1</text:span>.<text:span text:style-name="T2">3</text:span></text:p>
      <text:p text:style-name="P3">by Fredrik Ramsberg</text:p>
      <text:p text:style-name="P4"/>
      <text:h text:style-name="Heading_20_1" text:outline-level="1">What is NAIL?</text:h>
      <text:p text:style-name="P5">It’s simliar to a standard library for Inform 6, like a scaled-down version of PunyInform, meant for writing games for platforms with very little RAM. However, it lacks much of the finesse of PunyInform, and it’s <text:span text:style-name="T2">a less</text:span> clean approach. <text:span text:style-name="T2">Essentially, y</text:span>ou get <text:span text:style-name="T2">two</text:span> source code files to start with <text:span text:style-name="T2">(</text:span><text:span text:style-name="T3">game.inf</text:span><text:span text:style-name="T2"> and </text:span><text:span text:style-name="T3">grammar.inf</text:span><text:span text:style-name="T2">)</text:span>, you edit them until you’re happy, use two Ruby-scripts to <text:span text:style-name="T4">transform the files to a compilable form</text:span>, then compile them to a z3-file.</text:p>
      <text:h text:style-name="Heading_20_2" text:outline-level="2">How is <text:span text:style-name="T4">NAIL</text:span> better than PunyInform?</text:h>
      <text:list text:style-name="L1">
        <text:list-item>
          <text:p text:style-name="P6">It’s smaller. The minimum size <text:span text:style-name="T4">of a compiled game </text:span>is <text:span text:style-name="T5">less than</text:span> 1<text:span text:style-name="T5">1</text:span> KB, which is less than half the minimum size of PunyInform.</text:p>
        </text:list-item>
      </text:list>
      <text:h text:style-name="Heading_20_2" text:outline-level="2">How is <text:span text:style-name="T4">NAIL</text:span> worse than PunyInform?</text:h>
      <text:list text:style-name="L2">
        <text:list-item>
          <text:p text:style-name="P7">The parser is a <text:span text:style-name="T6">lot</text:span> simpler. It doesn’t support any parse tokens that use a routine <text:span text:style-name="T7">(</text:span>e.g. scope tokens or general parse routines<text:span text:style-name="T7">)</text:span>, giving orders to NPCs, multiple objects like ”get pear and apple” (Special case: ”get/drop all [but x]” is supported, <text:span text:style-name="T8">and secondary/indirect object is supported, e.g. ”put x in y”</text:span>).</text:p>
        </text:list-item>
        <text:list-item>
          <text:p text:style-name="P8">Updating the library to a new version <text:span text:style-name="T9">for</text:span> an existing project is hard<text:span text:style-name="T2">er</text:span>, because there is no clear separation between game code and library code. <text:span text:style-name="T10">However, </text:span><text:span text:style-name="T11">most</text:span><text:span text:style-name="T12"> of the library code is located in nail.h and parser.h, which you </text:span><text:span text:style-name="T13">shouldn’t</text:span><text:span text:style-name="T12"> need to touch, so if there’s a new version of NAIL, which includes changes to these two files, you can copy the new versions of these files into your </text:span><text:span text:style-name="T13">lib </text:span><text:span text:style-name="T12">folder, </text:span><text:span text:style-name="T14">overwriting the old versions</text:span><text:span text:style-name="T12">.</text:span></text:p>
        </text:list-item>
        <text:list-item>
          <text:p text:style-name="P8">Unlike PunyInform, there is no test suite that ensures that new versions don’t ruin existing functionality.</text:p>
        </text:list-item>
        <text:list-item>
          <text:p text:style-name="P7">The only supported output format is z3.</text:p>
        </text:list-item>
        <text:list-item>
          <text:p text:style-name="P7">The player can’t be in a closed, <text:span text:style-name="T15">non-transparent</text:span> container or in/on a nested container/supporter.</text:p>
        </text:list-item>
        <text:list-item>
          <text:p text:style-name="P7"><text:span text:style-name="T16">There is no</text:span> support <text:span text:style-name="T16">for </text:span><text:span text:style-name="T7">properties</text:span><text:span text:style-name="T16"> </text:span><text:span text:style-name="T17">add_to_scope</text:span>, <text:span text:style-name="T17">react_before</text:span> or <text:span text:style-name="T17">react_after</text:span> (there are ways to accomplish the same effect, but with messier code, see chapter on limitations).</text:p>
        </text:list-item>
        <text:list-item>
          <text:p text:style-name="P9">Parser error messages, as well as action messages, are cruder and more generic.</text:p>
        </text:list-item>
        <text:list-item>
          <text:p text:style-name="P7">The documentation is laughably bad. Expect to dig in source code files to find stuff out.</text:p>
        </text:list-item>
        <text:list-item>
          <text:p text:style-name="P7">You need to have Ruby installed <text:span text:style-name="T16">(used every time you compile a game)</text:span>.</text:p>
        </text:list-item>
      </text:list>
      <text:h text:style-name="P10" text:outline-level="1"><text:soft-page-break/>Getting started</text:h>
      <text:p text:style-name="P11">Copy the folder <text:span text:style-name="T17">examples/template. </text:span><text:span text:style-name="T18">Give the new folder a name you like. Edit the paths at the beginning of the file </text:span><text:span text:style-name="T17">build.bat </text:span><text:span text:style-name="T19">(or, if using Linux or MacOS:</text:span><text:span text:style-name="T20"> build.sh</text:span><text:span text:style-name="T19">)</text:span><text:span text:style-name="T18">. Start a command prompt. Navigate to your new folder. Type </text:span><text:span text:style-name="T17">build.bat</text:span><text:span text:style-name="T18"> </text:span><text:span text:style-name="T19">or </text:span><text:span text:style-name="T20">build.sh</text:span><text:span text:style-name="T18">. If all goes well, you should see </text:span><text:span text:style-name="T21">four</text:span><text:span text:style-name="T18"> new generated source code files appearing in your folder, and two new z3 files - one with DEBUG enabled and one without.</text:span></text:p>
      <text:h text:style-name="P12" text:outline-level="1">The files</text:h>
      <text:p text:style-name="Standard">The standard project consists of these files <text:span text:style-name="T1">(found in </text:span><text:span text:style-name="T22">examples/template</text:span><text:span text:style-name="T1">)</text:span>:</text:p>
      <text:list text:style-name="L3">
        <text:list-item>
          <text:p text:style-name="P13"><text:span text:style-name="T23">game.inf -</text:span>The main source code of the game. <text:span text:style-name="T24">Expect to edit this file a lot.</text:span></text:p>
        </text:list-item>
      </text:list>
      <text:list xml:id="list900022757" text:style-name="L4">
        <text:list-item>
          <text:p text:style-name="P14"><text:span text:style-name="T25">grammar</text:span><text:span text:style-name="T23">.</text:span><text:span text:style-name="T25">inf</text:span><text:span text:style-name="T23"> - </text:span><text:span text:style-name="T26">The action routines and the grammar for the game. </text:span><text:span text:style-name="T27">Expect to edit this quite a bit.</text:span></text:p>
        </text:list-item>
        <text:list-item>
          <text:p text:style-name="P15"><text:span text:style-name="T28">abbrev</text:span><text:span text:style-name="T29">iations</text:span><text:span text:style-name="T28">.h <text:s/></text:span><text:span text:style-name="T30">- Abbreviations to improve text compression. Included by game.inf. From time to time, you’ll want to use Zabbrev to figure out the best abbreviations for your game.</text:span></text:p>
        </text:list-item>
        <text:list-item>
          <text:p text:style-name="P16"><text:span text:style-name="T23">build.bat </text:span>- A batch file for Windows, to perform the steps needed to build Z-code files. <text:span text:style-name="T8">This is what it does</text:span><text:span text:style-name="T24">:</text:span></text:p>
        </text:list-item>
      </text:list>
      <text:list text:style-name="L5">
        <text:list-item>
          <text:p text:style-name="P17">Run <text:span text:style-name="T31">bin/</text:span><text:span text:style-name="T17">build_dictionary.rb</text:span>, producing <text:span text:style-name="T17">generated_dictionary.inf</text:span></text:p>
        </text:list-item>
        <text:list-item>
          <text:p text:style-name="P17">Run <text:span text:style-name="T31">bin/</text:span><text:span text:style-name="T17">transform_code.rb</text:span>, producing <text:span text:style-name="T17">generated_game.inf</text:span>, <text:span text:style-name="T17">generated_</text:span><text:span text:style-name="T32">grammar</text:span><text:span text:style-name="T17">.inf</text:span>, <text:span text:style-name="T10">and </text:span><text:span text:style-name="T32">generated_parser.h</text:span></text:p>
        </text:list-item>
        <text:list-item>
          <text:p text:style-name="P17"><text:span text:style-name="T8">Use</text:span> <text:span text:style-name="T17">inform6.exe</text:span> to compile <text:span text:style-name="T17">generated_game.inf</text:span>, which in turn includes <text:span text:style-name="T17">nail.h</text:span>, <text:span text:style-name="T17">generated_dictionary.inf</text:span>, <text:span text:style-name="T17">generated_parser.</text:span><text:span text:style-name="T32">h</text:span><text:span text:style-name="T10"> and </text:span><text:span text:style-name="T32">generated_grammar.inf</text:span>, to produce <text:span text:style-name="T17">game_debug.z3</text:span> and <text:span text:style-name="T17">game.z3</text:span></text:p>
        </text:list-item>
      </text:list>
      <text:list text:style-name="L6">
        <text:list-item>
          <text:p text:style-name="P18"><text:span text:style-name="T23">build.sh</text:span> - a shell script to do the same thing as <text:span text:style-name="T17">build.bat</text:span></text:p>
        </text:list-item>
      </text:list>
      <text:p text:style-name="P19"/>
      <text:p text:style-name="P19">All projects need to have access to the <text:span text:style-name="T17">bin</text:span> folder. In this folder, you find these Ruby files:</text:p>
      <text:list text:continue-list="list900022757" text:style-name="L4">
        <text:list-item>
          <text:p text:style-name="P20"><text:span text:style-name="T23">build_dictionary.rb </text:span>- Reads the source code files that contain dictionary words (<text:span text:style-name="T17">game.inf</text:span>, <text:span text:style-name="T33">grammar.inf</text:span><text:span text:style-name="T7"> </text:span>and <text:span text:style-name="T17">parser.</text:span><text:span text:style-name="T33">h</text:span>) and creates/overwrites a file called <text:span text:style-name="T17">generated_dictionary.inf</text:span></text:p>
        </text:list-item>
        <text:list-item>
          <text:p text:style-name="P21"><text:span text:style-name="T23">transform_code.rb</text:span> - Reads <text:span text:style-name="T17">generated_dictionary.inf</text:span>, then reads <text:span text:style-name="T17">game.inf</text:span> and creates/overwrites <text:span text:style-name="T17">generated_game.inf</text:span> where each dictionary word has been replaced by the corresponing constant from <text:span text:style-name="T17">generated_dictionary.inf</text:span>, then it reads <text:span text:style-name="T33">grammar.inf</text:span><text:span text:style-name="T7"> and creates/overwrites </text:span><text:span text:style-name="T33">generated_grammar.inf</text:span><text:span text:style-name="T7">, and reads </text:span><text:span text:style-name="T17">parser.</text:span><text:span text:style-name="T33">h</text:span> and creates/overwrites <text:span text:style-name="T17">generated_parser.</text:span><text:span text:style-name="T33">h</text:span> in the same manner.</text:p>
        </text:list-item>
      </text:list>
      <text:p text:style-name="P22"/>
      <text:p text:style-name="P22">All projects <text:span text:style-name="T2">also </text:span>need to have access to the <text:span text:style-name="T34">lib</text:span> folder. In this folder, you find these files:</text:p>
      <text:list text:style-name="L7">
        <text:list-item>
          <text:p text:style-name="P23">nail.h<text:span text:style-name="T26"> – Contains most of the library code.</text:span></text:p>
        </text:list-item>
        <text:list-item>
          <text:p text:style-name="P23">parser.h<text:span text:style-name="T26"> – Contains the parser code and some supporting routines. </text:span></text:p>
        </text:list-item>
      </text:list>
      <text:p text:style-name="P22"/>
      <text:h text:style-name="Heading_20_1" text:outline-level="1">Action<text:span text:style-name="T24">s and </text:span>Grammar</text:h>
      <text:p text:style-name="Standard"><text:span text:style-name="T35">In the file </text:span><text:span text:style-name="T32">grammar</text:span><text:span text:style-name="T36">.inf</text:span><text:span text:style-name="T35">, c</text:span>reate a grammar table (e.g. <text:span text:style-name="T17">g_take</text:span>) for each verb (synonyms use the same grammar table though). Each line in the grammar table consists of an action, followed by up to three grammar tokens or dictionary words. Alternative prepositions are not supported. E.g. <text:span text:style-name="T37">support</text:span>ing "PUT X IN/INTO Y" requires two grammar lines.</text:p>
      <text:p text:style-name="Standard"/>
      <text:p text:style-name="Standard">The available tokens are:</text:p>
      <text:list text:style-name="L8">
        <text:list-item>
          <text:p text:style-name="P24"><text:soft-page-break/><text:span text:style-name="T23">T_NOUN</text:span>: Matches an object, which is then put into the <text:span text:style-name="T17">noun</text:span> variable.</text:p>
        </text:list-item>
        <text:list-item>
          <text:p text:style-name="P24"><text:span text:style-name="T23">T_SECOND</text:span>: Matches an object, which is then put into the <text:span text:style-name="T17">second</text:span> variable.</text:p>
        </text:list-item>
        <text:list-item>
          <text:p text:style-name="P24"><text:span text:style-name="T23">T_DIRECTION</text:span>: Matches a direction, which is then put into the <text:span text:style-name="T17">direction</text:span> variable. (Directions are not objects, in any way).</text:p>
        </text:list-item>
        <text:list-item>
          <text:p text:style-name="P24"><text:span text:style-name="T23">T_TOPIC</text:span>: Matches any number of words. Must be followed by a <text:span text:style-name="T37">preposition</text:span>, or be the last token on the line.</text:p>
        </text:list-item>
        <text:list-item>
          <text:p text:style-name="P24"><text:span text:style-name="T23">T_ALL</text:span>: Matches 'all' or 'everything'</text:p>
        </text:list-item>
        <text:list-item>
          <text:p text:style-name="P24"><text:span text:style-name="T23">T_BUT</text:span>: Matches 'but' or 'except'</text:p>
        </text:list-item>
        <text:list-item>
          <text:p text:style-name="P24"><text:span text:style-name="T23">T_SET_META</text:span>: Has to be the first entry in a grammar table. Doesn't match anything, but sets <text:span text:style-name="T17">meta = true</text:span> for the entire grammar table.</text:p>
        </text:list-item>
      </text:list>
      <text:h text:style-name="Heading_20_1" text:outline-level="1">Dictionary</text:h>
      <text:p text:style-name="P25">There is no dictionary. Instead each word is represented by a 16-bit checksum of that word - a number which is either in the range [-2000, -977] or [1024, 32767] <text:span text:style-name="T38">(a range of numbers around 0 is deliberately avoided, because it’s convenient to be able to tell dictionary word checksums from NULL, false, true, object numbers, verb numbers, and some other values</text:span>. </text:p>
      <text:p text:style-name="P25"/>
      <text:p text:style-name="P25">When the player has typed a command, the parser calculates and stores the checksum for each typed word in the parse table. The game <text:span text:style-name="T24">author</text:span> can compare these values to dictionary words in the code, but <text:span text:style-name="T35">the build process will in fact replace </text:span>the dictionary words <text:span text:style-name="T35">with</text:span> constants representing the checksum of these words, <text:span text:style-name="T35">when generating </text:span><text:span text:style-name="T36">generated_game.inf</text:span><text:span text:style-name="T35">, </text:span><text:span text:style-name="T39">generated_grammar.inf</text:span><text:span text:style-name="T37">, </text:span><text:span text:style-name="T35">and </text:span><text:span text:style-name="T36">generated_parser.</text:span><text:span text:style-name="T39">h</text:span>.</text:p>
      <text:p text:style-name="Standard"/>
      <text:p text:style-name="P26">The names of the constants for different words are derived from the words, e.g. ’east’ gets the constant name W_EAST. A single quote character is transformed to _Q_ , so ’tom^s’ gets the constant name W_TOM_Q_S.</text:p>
      <text:p text:style-name="P26"/>
      <text:p text:style-name="P26">If you have a word which can’t be turned into a constant in this automated manner, maybe because it contains illegal characters or because the name is already in use, you <text:span text:style-name="T37">can</text:span> decide on a constant name yourself, and declare it in a comment in <text:span text:style-name="T17">game.inf</text:span>. This is what it may look like:</text:p>
      <text:p text:style-name="P26"/>
      <text:p text:style-name="Preformatted_20_Text">! 'to' = W_TO_WORD</text:p>
      <text:p text:style-name="Preformatted_20_Text"/>
      <text:p text:style-name="P27">This particular line avoids having the constant for ’w//’ collide with the w_to property. Note that you can only declare one such constant per line.</text:p>
      <text:p text:style-name="P28">If a certain constant name would contain special characters, and you have not assigned a special name to it in this way, it will be called <text:span text:style-name="T17">W_SPECIAL_WORD_</text:span>n , where n is 0, 1, 2 etc.</text:p>
      <text:p text:style-name="P29"><text:span text:style-name="T23">Note</text:span>: <text:span text:style-name="T35">Encoding the words as checksums involves finding an encoding factor that give all the words distinct checksums. </text:span>As the list of words your game recognize<text:span text:style-name="T35">s</text:span> grows, it is possible that the <text:span text:style-name="T17">build</text:span><text:span text:style-name="T31">_dictionary.rb</text:span><text:span text:style-name="T40"> script will fail to find a factor which makes all words get distinct values. If this happens, you will see that build_dictionary reports some collisions. The exact collisions are listed in </text:span><text:span text:style-name="T31">generated_dictionary.inf</text:span><text:span text:style-name="T41">. If this happens, read the list of collisions, and decide if it’s important that the parser can tell these words apart. E.g. if there is a collision between two words that are only used for two different static or scenery objects, which will never be in scope at the same time, it doesn’t matter. If you have collisions that matter, consider leaving out a synonym for an object or a verb, or even renaming an object. Note that a collision between a verb and a noun is typically okay – the parser can’t confuse them.</text:span></text:p>
      <text:h text:style-name="P30" text:outline-level="1"><text:soft-page-break/>Limitations <text:span text:style-name="T35">of NAIL, </text:span>compared to PunyInform</text:h>
      <text:list text:style-name="L9">
        <text:list-item>
          <text:p text:style-name="P31">z3 is the only target supported</text:p>
        </text:list-item>
        <text:list-item>
          <text:p text:style-name="P31">Parser limitations:</text:p>
        </text:list-item>
      </text:list>
      <text:list text:style-name="L10">
        <text:list-item>
          <text:list>
            <text:list-item>
              <text:p text:style-name="P32">NOT SUPPORTED: Multiple objects or plural, except for "take all [but x]" and "drop all [but x]". E.g. "take pear and apple" isn't supported. Secondary object is supported, e.g. "put apple in box".</text:p>
            </text:list-item>
            <text:list-item>
              <text:p text:style-name="P32">NOT SUPPORTED: Giving NPCs orders, e.g. "John, pull lever".</text:p>
            </text:list-item>
            <text:list-item>
              <text:p text:style-name="P32">NOT SUPPORTED: grammar tokens involving routines (scope tokens, general parse routines etc)</text:p>
            </text:list-item>
            <text:list-item>
              <text:p text:style-name="P32">NOT SUPPORTED: grammar lines with alternative prepositions</text:p>
            </text:list-item>
          </text:list>
        </text:list-item>
      </text:list>
      <text:list text:style-name="L11">
        <text:list-item>
          <text:p text:style-name="P33">The player must never be in a closed, <text:span text:style-name="T42">non-transparent</text:span> container. Workaround: Move the player to a room that represents the inside of the container.</text:p>
        </text:list-item>
        <text:list-item>
          <text:p text:style-name="P33">Nested enterable objects are not supported (e.g. a seat in a car).</text:p>
        </text:list-item>
        <text:list-item>
          <text:p text:style-name="P33">Regular grammar tables are not in use, and you can't use <text:span text:style-name="T17">Verb</text:span> or <text:span text:style-name="T17">Extend</text:span>. You have to alter the grammar in the file where it is defined (typically <text:span text:style-name="T43">grammar</text:span><text:span text:style-name="T17">.inf</text:span>).</text:p>
        </text:list-item>
        <text:list-item>
          <text:p text:style-name="P33">Since there is no dictionary, you can't print dictionary words, or check for verb flag etc.</text:p>
        </text:list-item>
        <text:list-item>
          <text:p text:style-name="P33">Scope can only be calculated for the player, not for other actors.</text:p>
        </text:list-item>
        <text:list-item>
          <text:p text:style-name="P34">Attributes <text:span text:style-name="T17">edible</text:span>, <text:span text:style-name="T17">talkable</text:span> are not supported.</text:p>
        </text:list-item>
        <text:list-item>
          <text:p text:style-name="P33">Properties <text:span text:style-name="T17">orders</text:span>, <text:span text:style-name="T17">grammar</text:span>, <text:span text:style-name="T17">life</text:span>, <text:span text:style-name="T17">capacity</text:span>, <text:span text:style-name="T17">inside_description</text:span>, <text:span text:style-name="T17">list_together</text:span> are not supported.</text:p>
        </text:list-item>
        <text:list-item>
          <text:p text:style-name="P33">Property <text:span text:style-name="T17">add_to_scope</text:span> is not supported. Use entry point <text:span text:style-name="T17">InScope</text:span> instead.</text:p>
        </text:list-item>
        <text:list-item>
          <text:p text:style-name="P33">Properties <text:span text:style-name="T17">react_before</text:span> and <text:span text:style-name="T17">react_after</text:span> are not supported. Use <text:span text:style-name="T17">before</text:span>/<text:span text:style-name="T17">after</text:span> in location, or <text:span text:style-name="T17">GamePreRoutine</text:span>/<text:span text:style-name="T17">GamePostRoutine</text:span> instead. </text:p>
        </text:list-item>
        <text:list-item>
          <text:p text:style-name="P33">Properties <text:span text:style-name="T17">when_on</text:span>, <text:span text:style-name="T17">when_off</text:span>, <text:span text:style-name="T17">when_open</text:span>, <text:span text:style-name="T17">when_closed</text:span> are not supported. Use <text:span text:style-name="T17">initial</text:span> and <text:span text:style-name="T17">describe</text:span> <text:span text:style-name="T24">instead</text:span>.</text:p>
          <text:p text:style-name="P33"/>
        </text:list-item>
      </text:list>
      <text:h text:style-name="Heading_20_1" text:outline-level="1">Differences to PunyInform</text:h>
      <text:list text:style-name="L12">
        <text:list-item>
          <text:p text:style-name="P35">Directions are not considered objects, in any way.</text:p>
        </text:list-item>
        <text:list-item>
          <text:p text:style-name="P36">If a command involves a direction, it is stored in the <text:span text:style-name="T17">direction</text:span> variable.</text:p>
        </text:list-item>
        <text:list-item>
          <text:p text:style-name="P36"><text:span text:style-name="T17">noun</text:span>/<text:span text:style-name="T17">second</text:span> are not used to store anything but object numbers. </text:p>
        </text:list-item>
        <text:list-item>
          <text:p text:style-name="P37">The first word of a topic (not counting articles) is stored in <text:span text:style-name="T17">first_topic_word</text:span>.</text:p>
        </text:list-item>
        <text:list-item>
          <text:p text:style-name="P38">There is no grammar token for a number, but you can use a <text:span text:style-name="T20">T_TOPIC</text:span> token instead, and use <text:span text:style-name="T17">x = TryNumber(consult_from)</text:span> to extract a number from the first word, or decide that it’s not a number (-1000 means not a number, 0-10000 means a number).</text:p>
        </text:list-item>
        <text:list-item>
          <text:p text:style-name="P39">Simple doors (an optional feature in PunyInform) is always available in NAIL. There is no constant to enable or disable it.</text:p>
        </text:list-item>
        <text:list-item>
          <text:p text:style-name="P40">Since there is no <text:span text:style-name="T17">life</text:span> property, you use <text:span text:style-name="T17">before</text:span> to react instead (<text:span text:style-name="T44">##</text:span>Ask, <text:span text:style-name="T44">##</text:span>Tell, <text:span text:style-name="T44">##</text:span>Give, <text:span text:style-name="T44">##</text:span>Show, <text:span text:style-name="T44">##</text:span>Attack, <text:span text:style-name="T44">##</text:span>ThrownAt, <text:span text:style-name="T44">##</text:span>Answer).</text:p>
        </text:list-item>
        <text:list-item>
          <text:p text:style-name="P40"><text:span text:style-name="T45">##</text:span>Give and <text:span text:style-name="T45">##</text:span>Show have the actor as noun, so an actor's <text:span text:style-name="T17">before</text:span> routine can react to these actions. (Just like in PunyInform / Inform 6, <text:span text:style-name="T45">##</text:span>Ask and <text:span text:style-name="T45">##</text:span>Tell have the actor as noun).</text:p>
        </text:list-item>
        <text:list-item>
          <text:p text:style-name="P40">Instead of using the <text:span text:style-name="T17">name</text:span> property, you use the <text:span text:style-name="T17">nouns</text:span> property to store a list of synonyms for an object. If you need more than four synonyms, use the <text:span text:style-name="T17">longnouns</text:span> property instead - an individual property, which takes up more space and is slower to access, but can hold up to 32 values.</text:p>
        </text:list-item>
        <text:list-item>
          <text:p text:style-name="P40"><text:soft-page-break/>Property <text:span text:style-name="T17">invent</text:span> is only called once per object, not with different <text:span text:style-name="T17">invent_stage</text:span> values. It can either print all information about the object and return true, or don't print anything and return false, <text:span text:style-name="T44">or (sometimes useful) print something (e.g. ”full ” or ”empty ”) and return false to have the object printed in the normal way</text:span>.</text:p>
        </text:list-item>
        <text:list-item>
          <text:p text:style-name="P40">The author must always set <text:span text:style-name="T17">scope_modified = true</text:span> when doing something which may affect what's in scope. (This is optional in PunyInform, see <text:span text:style-name="T17">OPTIONAL_MANUAL_SCOPE</text:span>. Here, it's mandatory.)</text:p>
        </text:list-item>
        <text:list-item>
          <text:p text:style-name="P40"><text:span text:style-name="T45">As an</text:span> author, <text:span text:style-name="T45">you</text:span> must give the <text:span text:style-name="T17">reactive</text:span> attribute to all objects that provide the <text:span text:style-name="T17">each_turn</text:span> property. (This is optional in PunyInform, see <text:span text:style-name="T17">OPTIONAL_MANUAL_REACTIVE</text:span>. Here, it's mandatory.) If <text:span text:style-name="T45">you</text:span> define <text:span text:style-name="T17">OPTIONAL_REACTIVE_PARSE_NAME</text:span>, <text:span text:style-name="T45">you</text:span> must also give <text:span text:style-name="T17">reactive</text:span> to all objects that provide <text:span text:style-name="T17">parse_name</text:span>. </text:p>
        </text:list-item>
        <text:list-item>
          <text:p text:style-name="P40">Lookmode commands use the Look verb: "look short/superbrief", "look normal/brief", "look long/verbose". <text:span text:style-name="T45">Also, the ability to control lookmode is optional – set </text:span><text:span text:style-name="T20">OPTIONAL_LOOKMODE</text:span><text:span text:style-name="T45"> to enable it.</text:span></text:p>
        </text:list-item>
        <text:list-item>
          <text:p text:style-name="P41">Disambiguation can only be done by having the user select one of the objects from a numbered list, using a special prompt. Failing to select an object means the first object in the list is selected.</text:p>
        </text:list-item>
      </text:list>
      <text:h text:style-name="Heading_20_1" text:outline-level="1">Supported user-defined constants:</text:h>
      <text:p text:style-name="Standard"/>
      <text:list text:style-name="L13">
        <text:list-item>
          <text:p text:style-name="P42">Story</text:p>
        </text:list-item>
        <text:list-item>
          <text:p text:style-name="P42">Headline</text:p>
        </text:list-item>
        <text:list-item>
          <text:p text:style-name="P42">DEBUG</text:p>
        </text:list-item>
        <text:list-item>
          <text:p text:style-name="P42">INITIAL_LOCATION_VALUE</text:p>
        </text:list-item>
        <text:list-item>
          <text:p text:style-name="P42">GOTOSUB_BUFFER_SIZE - In DEBUG mode, set to length of longest object name</text:p>
        </text:list-item>
        <text:list-item>
          <text:p text:style-name="P42">MAX_FLOATING_OBJECTS</text:p>
        </text:list-item>
        <text:list-item>
          <text:p text:style-name="P42">MAX_SCOPE</text:p>
        </text:list-item>
        <text:list-item>
          <text:p text:style-name="P43">MAX_WHICH_OBJECTS</text:p>
        </text:list-item>
        <text:list-item>
          <text:p text:style-name="P42">NO_PLACES - See DM4</text:p>
        </text:list-item>
        <text:list-item>
          <text:p text:style-name="P42">OPTIONAL_DARKNESS (Opposite of PunyInform's OPTIONAL_NO_DARKNESS)</text:p>
        </text:list-item>
        <text:list-item>
          <text:p text:style-name="P42">OPTIONAL_LOOKMODE - Support "look short/normal/long" to choose lookmode</text:p>
        </text:list-item>
        <text:list-item>
          <text:p text:style-name="P42">OPTIONAL_PRONOUNS - Support it/him/her/them in commands</text:p>
        </text:list-item>
        <text:list-item>
          <text:p text:style-name="P42">OPTIONAL_REACTIVE_PARSE_NAME - See PunyInform</text:p>
        </text:list-item>
        <text:list-item>
          <text:p text:style-name="P42">OPTIONAL_SCRIPT - Include support for "script on/off" and "recording on/off" and "replay"</text:p>
        </text:list-item>
        <text:list-item>
          <text:p text:style-name="P42">RUNTIME_ERRORS - See PunyInform</text:p>
        </text:list-item>
        <text:list-item>
          <text:p text:style-name="P42">STATUSLINE_SCORE - See PunyInform</text:p>
        </text:list-item>
        <text:list-item>
          <text:p text:style-name="P44">STATUSLINE_TIME - See PunyInform</text:p>
        </text:list-item>
        <text:list-item>
          <text:p text:style-name="P44">Scoring:</text:p>
        </text:list-item>
      </text:list>
      <text:list text:style-name="L14">
        <text:list-item>
          <text:list>
            <text:list-item>
              <text:p text:style-name="P45">NO_SCORE - See PunyInform</text:p>
            </text:list-item>
            <text:list-item>
              <text:p text:style-name="P45">MAX_SCORE - See DM4</text:p>
            </text:list-item>
            <text:list-item>
              <text:p text:style-name="P45">OBJECT_SCORE - See DM4</text:p>
            </text:list-item>
            <text:list-item>
              <text:p text:style-name="P45">ROOM_SCORE - See DM4</text:p>
            </text:list-item>
            <text:list-item>
              <text:p text:style-name="P45">OPTIONAL_SCORED - See PunyInform</text:p>
            </text:list-item>
            <text:list-item>
              <text:p text:style-name="P45">OPTIONAL_FULL_SCORE (NO_SCORE can't be defined) - See PunyInform</text:p>
            </text:list-item>
            <text:list-item>
              <text:p text:style-name="P45">TASKS_PROVIDED (requires OPTIONAL_FULL_SCORE) - See DM4</text:p>
            </text:list-item>
            <text:list-item>
              <text:p text:style-name="P45">NUMBER_TASKS (requires TASKS_PROVIDED) - See DM4</text:p>
            </text:list-item>
          </text:list>
        </text:list-item>
      </text:list>
      <text:p text:style-name="Standard"/>
      <text:h text:style-name="Heading_20_1" text:outline-level="1"><text:soft-page-break/>Supported entry points </text:h>
      <text:p text:style-name="Text_20_body">(See DM4 <text:span text:style-name="T24">for most of them</text:span>)</text:p>
      <text:list text:style-name="L15">
        <text:list-item>
          <text:p text:style-name="P46">Amusing</text:p>
        </text:list-item>
        <text:list-item>
          <text:p text:style-name="P46">AfterLife</text:p>
        </text:list-item>
        <text:list-item>
          <text:p text:style-name="P46">DarkToDark</text:p>
        </text:list-item>
        <text:list-item>
          <text:p text:style-name="P46">DeathMessage</text:p>
        </text:list-item>
        <text:list-item>
          <text:p text:style-name="P46">DebugParseNameObject - See PunyInform</text:p>
        </text:list-item>
        <text:list-item>
          <text:p text:style-name="P46">GamePostRoutine</text:p>
        </text:list-item>
        <text:list-item>
          <text:p text:style-name="P46">GamePreRoutine</text:p>
        </text:list-item>
        <text:list-item>
          <text:p text:style-name="P46">InScope</text:p>
        </text:list-item>
        <text:list-item>
          <text:p text:style-name="P46">IsARoom - See PunyInform</text:p>
        </text:list-item>
        <text:list-item>
          <text:p text:style-name="P46">LookRoutine</text:p>
        </text:list-item>
        <text:list-item>
          <text:p text:style-name="P46">NewRoom</text:p>
        </text:list-item>
        <text:list-item>
          <text:p text:style-name="P46">PrintTaskName (requires OPTIONAL_FULL_SCORE)</text:p>
        </text:list-item>
        <text:list-item>
          <text:p text:style-name="P46">TimePasses</text:p>
          <text:p text:style-name="P46"/>
        </text:list-item>
      </text:list>
      <text:h text:style-name="Heading_20_1" text:outline-level="1"><text:span text:style-name="T24">Using PunyInform </text:span>Extensions</text:h>
      <text:list text:style-name="L16">
        <text:list-item>
          <text:p text:style-name="P47"><text:span text:style-name="T23">Cheap Scenery</text:span> - works. To make the 'cstest' debug verb work, you have to add grammar to your game to make "cstest" trigger the ##DebugCheapScenery action.</text:p>
        </text:list-item>
        <text:list-item>
          <text:p text:style-name="P47"><text:span text:style-name="T23">Flags</text:span> - works</text:p>
        </text:list-item>
        <text:list-item>
          <text:p text:style-name="P47"><text:span text:style-name="T23">Menu</text:span> - works</text:p>
        </text:list-item>
        <text:list-item>
          <text:p text:style-name="P47"><text:span text:style-name="T23">Quote Box</text:span> - works</text:p>
        </text:list-item>
        <text:list-item>
          <text:p text:style-name="P47"><text:span text:style-name="T23">Talk Menu</text:span> - works. You have to add grammar to your game to make "talk to noun" and "talk noun" trigger the ##Talk action. In Debug mode, you have to add grammar to make "tmtest" and "tmtest noun" trigger the ##TMTest action.</text:p>
        </text:list-item>
        <text:list-item>
          <text:p text:style-name="P47"><text:span text:style-name="T23">Wait Time</text:span> - Doesn't work. One would need to create a new reworked version which doesn't use a general parse routin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sv" fo:country="S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3T20:03:22.339826300</meta:creation-date>
    <dc:date>2026-07-05T17:05:52.536890500</dc:date>
    <meta:editing-duration>P20DT45M50S</meta:editing-duration>
    <meta:editing-cycles>27</meta:editing-cycles>
    <meta:generator>LibreOffice/25.2.5.2$Windows_X86_64 LibreOffice_project/03d19516eb2e1dd5d4ccd751a0d6f35f35e08022</meta:generator>
    <meta:document-statistic meta:table-count="0" meta:image-count="0" meta:object-count="0" meta:page-count="6" meta:paragraph-count="138" meta:word-count="2250" meta:character-count="13614" meta:non-whitespace-character-count="11595"/>
  </office:meta>
</office:document-meta>
</file>